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D0000029A51F661444BFAEC5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c652" officeooo:paragraph-rsid="0004c65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7a554" officeooo:paragraph-rsid="0007a554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7a554" officeooo:paragraph-rsid="0009883a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9883a" officeooo:paragraph-rsid="0009883a" style:font-weight-asian="normal" style:font-weight-complex="normal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09883a" officeooo:paragraph-rsid="0009883a" style:font-weight-asian="normal" style:font-weight-complex="normal"/>
    </style:style>
    <style:style style:name="P6" style:family="paragraph" style:parent-style-name="Standard">
      <style:paragraph-properties fo:margin-top="0.0398in" fo:margin-bottom="0.0398in" loext:contextual-spacing="false" fo:text-align="center" style:justify-single-word="false"/>
      <style:text-properties fo:font-weight="normal" officeooo:rsid="0009883a" officeooo:paragraph-rsid="0009883a" style:font-weight-asian="normal" style:font-weight-complex="normal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0d3412" officeooo:paragraph-rsid="000d3412" style:font-weight-asian="normal" style:font-weight-complex="normal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0d7e80" officeooo:paragraph-rsid="000d7e80" style:font-weight-asian="normal" style:font-weight-complex="normal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0d7e80" officeooo:paragraph-rsid="000e2bf3" style:font-weight-asian="normal" style:font-weight-complex="normal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0e2bf3" officeooo:paragraph-rsid="000e2bf3" style:font-weight-asian="normal" style:font-weight-complex="normal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bold" officeooo:rsid="0004c652" officeooo:paragraph-rsid="000d3412" style:font-weight-asian="bold" style:font-weight-complex="bold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0d3412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09883a"/>
    </style:style>
    <style:style style:name="P14" style:family="paragraph" style:parent-style-name="Standard">
      <style:paragraph-properties fo:margin-top="0.0398in" fo:margin-bottom="0.0398in" loext:contextual-spacing="false"/>
      <style:text-properties officeooo:rsid="00060e71" officeooo:paragraph-rsid="00060e71"/>
    </style:style>
    <style:style style:name="P15" style:family="paragraph" style:parent-style-name="Standard">
      <style:paragraph-properties fo:margin-top="0.0398in" fo:margin-bottom="0.0398in" loext:contextual-spacing="false"/>
      <style:text-properties officeooo:rsid="0007a554" officeooo:paragraph-rsid="0007a554"/>
    </style:style>
    <style:style style:name="P16" style:family="paragraph" style:parent-style-name="Heading_20_3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9883a" officeooo:paragraph-rsid="0009883a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4e7f9" officeooo:paragraph-rsid="0014e7f9" style:font-weight-asian="normal" style:font-weight-complex="normal"/>
    </style:style>
    <style:style style:name="P19" style:family="paragraph" style:parent-style-name="Standard" style:list-style-name="L12">
      <style:text-properties officeooo:paragraph-rsid="0004c652"/>
    </style:style>
    <style:style style:name="P20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09883a" officeooo:paragraph-rsid="0009883a" style:font-weight-asian="normal" style:font-weight-complex="normal"/>
    </style:style>
    <style:style style:name="P21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fo:font-weight="normal" officeooo:rsid="0009883a" officeooo:paragraph-rsid="0009883a" style:font-weight-asian="normal" style:font-weight-complex="normal"/>
    </style:style>
    <style:style style:name="P22" style:family="paragraph" style:parent-style-name="Standard" style:list-style-name="L3">
      <style:paragraph-properties fo:margin-top="0.0398in" fo:margin-bottom="0.0398in" loext:contextual-spacing="false" fo:text-align="start" style:justify-single-word="false"/>
      <style:text-properties fo:font-weight="normal" officeooo:rsid="0009883a" officeooo:paragraph-rsid="0009883a" style:font-weight-asian="normal" style:font-weight-complex="normal"/>
    </style:style>
    <style:style style:name="P23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font-weight="normal" officeooo:rsid="000d3412" officeooo:paragraph-rsid="000d7e80" style:font-weight-asian="normal" style:font-weight-complex="normal"/>
    </style:style>
    <style:style style:name="P24" style:family="paragraph" style:parent-style-name="Standard" style:list-style-name="L4">
      <style:paragraph-properties fo:margin-top="0.0398in" fo:margin-bottom="0.0398in" loext:contextual-spacing="false" fo:text-align="start" style:justify-single-word="false"/>
      <style:text-properties fo:font-weight="normal" officeooo:rsid="000d3412" officeooo:paragraph-rsid="0009883a" style:font-weight-asian="normal" style:font-weight-complex="normal"/>
    </style:style>
    <style:style style:name="P25" style:family="paragraph" style:parent-style-name="Standard" style:list-style-name="L4">
      <style:paragraph-properties fo:margin-top="0.0398in" fo:margin-bottom="0.0398in" loext:contextual-spacing="false" fo:text-align="start" style:justify-single-word="false"/>
      <style:text-properties fo:font-weight="normal" officeooo:rsid="000d3412" officeooo:paragraph-rsid="000d3412" style:font-weight-asian="normal" style:font-weight-complex="normal"/>
    </style:style>
    <style:style style:name="P26" style:family="paragraph" style:parent-style-name="Standard" style:list-style-name="L5">
      <style:paragraph-properties fo:margin-top="0.0398in" fo:margin-bottom="0.0398in" loext:contextual-spacing="false" fo:text-align="start" style:justify-single-word="false"/>
      <style:text-properties fo:font-weight="normal" officeooo:rsid="000d3412" officeooo:paragraph-rsid="000d3412" style:font-weight-asian="normal" style:font-weight-complex="normal"/>
    </style:style>
    <style:style style:name="P27" style:family="paragraph" style:parent-style-name="Standard" style:list-style-name="L6">
      <style:paragraph-properties fo:margin-top="0.0398in" fo:margin-bottom="0.0398in" loext:contextual-spacing="false" fo:text-align="start" style:justify-single-word="false"/>
      <style:text-properties fo:font-weight="normal" officeooo:rsid="000d3412" officeooo:paragraph-rsid="000d3412" style:font-weight-asian="normal" style:font-weight-complex="normal"/>
    </style:style>
    <style:style style:name="P28" style:family="paragraph" style:parent-style-name="Standard" style:list-style-name="L7">
      <style:paragraph-properties fo:margin-top="0.0398in" fo:margin-bottom="0.0398in" loext:contextual-spacing="false" fo:text-align="start" style:justify-single-word="false"/>
      <style:text-properties fo:font-weight="normal" officeooo:rsid="000d3412" officeooo:paragraph-rsid="000d3412" style:font-weight-asian="normal" style:font-weight-complex="normal"/>
    </style:style>
    <style:style style:name="P29" style:family="paragraph" style:parent-style-name="Standard" style:list-style-name="L8">
      <style:paragraph-properties fo:margin-top="0.0398in" fo:margin-bottom="0.0398in" loext:contextual-spacing="false" fo:text-align="start" style:justify-single-word="false"/>
      <style:text-properties fo:font-weight="normal" officeooo:rsid="000d3412" officeooo:paragraph-rsid="000d3412" style:font-weight-asian="normal" style:font-weight-complex="normal"/>
    </style:style>
    <style:style style:name="P30" style:family="paragraph" style:parent-style-name="Standard" style:list-style-name="L9">
      <style:paragraph-properties fo:margin-top="0.0398in" fo:margin-bottom="0.0398in" loext:contextual-spacing="false" fo:text-align="start" style:justify-single-word="false"/>
      <style:text-properties fo:font-weight="normal" officeooo:rsid="000d3412" officeooo:paragraph-rsid="000d3412" style:font-weight-asian="normal" style:font-weight-complex="normal"/>
    </style:style>
    <style:style style:name="P31" style:family="paragraph" style:parent-style-name="Standard" style:list-style-name="L9">
      <style:paragraph-properties fo:margin-top="0.0398in" fo:margin-bottom="0.0398in" loext:contextual-spacing="false" fo:text-align="start" style:justify-single-word="false"/>
      <style:text-properties fo:font-weight="normal" officeooo:rsid="000d7e80" officeooo:paragraph-rsid="000d3412" style:font-weight-asian="normal" style:font-weight-complex="normal"/>
    </style:style>
    <style:style style:name="P32" style:family="paragraph" style:parent-style-name="Standard" style:list-style-name="L10">
      <style:paragraph-properties fo:margin-top="0.0398in" fo:margin-bottom="0.0398in" loext:contextual-spacing="false" fo:text-align="start" style:justify-single-word="false"/>
      <style:text-properties fo:font-weight="normal" officeooo:rsid="000d7e80" officeooo:paragraph-rsid="000d7e80" style:font-weight-asian="normal" style:font-weight-complex="normal"/>
    </style:style>
    <style:style style:name="P33" style:family="paragraph" style:parent-style-name="Standard" style:list-style-name="L11">
      <style:paragraph-properties fo:margin-top="0.0398in" fo:margin-bottom="0.0398in" loext:contextual-spacing="false" fo:text-align="start" style:justify-single-word="false"/>
      <style:text-properties fo:font-weight="normal" officeooo:rsid="000d7e80" officeooo:paragraph-rsid="000d7e80" style:font-weight-asian="normal" style:font-weight-complex="normal"/>
    </style:style>
    <style:style style:name="P34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officeooo:paragraph-rsid="000d7e80"/>
    </style:style>
    <style:style style:name="P35" style:family="paragraph" style:parent-style-name="Standard" style:list-style-name="L9">
      <style:paragraph-properties fo:margin-top="0.0398in" fo:margin-bottom="0.0398in" loext:contextual-spacing="false" fo:text-align="start" style:justify-single-word="false"/>
      <style:text-properties officeooo:paragraph-rsid="000d3412"/>
    </style:style>
    <style:style style:name="P36" style:family="paragraph" style:parent-style-name="Standard" style:list-style-name="L12">
      <style:paragraph-properties fo:margin-top="0.0398in" fo:margin-bottom="0.0398in" loext:contextual-spacing="false"/>
      <style:text-properties officeooo:rsid="0004c652" officeooo:paragraph-rsid="0004c652"/>
    </style:style>
    <style:style style:name="P37" style:family="paragraph" style:parent-style-name="Standard" style:list-style-name="L12">
      <style:paragraph-properties fo:margin-top="0.0398in" fo:margin-bottom="0.0398in" loext:contextual-spacing="false"/>
      <style:text-properties officeooo:rsid="0004c652" officeooo:paragraph-rsid="0018fef7"/>
    </style:style>
    <style:style style:name="P38" style:family="paragraph" style:parent-style-name="Standard" style:list-style-name="L13">
      <style:paragraph-properties fo:margin-top="0.0398in" fo:margin-bottom="0.0398in" loext:contextual-spacing="false"/>
      <style:text-properties officeooo:rsid="0004c652" officeooo:paragraph-rsid="0004c652"/>
    </style:style>
    <style:style style:name="P39" style:family="paragraph" style:parent-style-name="Standard" style:list-style-name="L13">
      <style:paragraph-properties fo:margin-top="0.0398in" fo:margin-bottom="0.0398in" loext:contextual-spacing="false"/>
      <style:text-properties officeooo:rsid="00060e71" officeooo:paragraph-rsid="00060e71"/>
    </style:style>
    <style:style style:name="P40" style:family="paragraph" style:parent-style-name="Standard" style:list-style-name="L13">
      <style:paragraph-properties fo:margin-top="0.0398in" fo:margin-bottom="0.0398in" loext:contextual-spacing="false"/>
      <style:text-properties fo:color="#2a6099" officeooo:rsid="00060e71" officeooo:paragraph-rsid="00060e71"/>
    </style:style>
    <style:style style:name="P41" style:family="paragraph" style:parent-style-name="Standard" style:list-style-name="L14">
      <style:paragraph-properties fo:margin-top="0.0398in" fo:margin-bottom="0.0398in" loext:contextual-spacing="false"/>
      <style:text-properties fo:color="#2a6099" officeooo:rsid="0007a554" officeooo:paragraph-rsid="0007a554"/>
    </style:style>
    <style:style style:name="P42" style:family="paragraph" style:parent-style-name="Standard" style:list-style-name="L14">
      <style:paragraph-properties fo:margin-top="0.0398in" fo:margin-bottom="0.0398in" loext:contextual-spacing="false"/>
      <style:text-properties officeooo:rsid="0007a554" officeooo:paragraph-rsid="0007a554"/>
    </style:style>
    <style:style style:name="T1" style:family="text">
      <style:text-properties fo:color="#2a6099"/>
    </style:style>
    <style:style style:name="T2" style:family="text">
      <style:text-properties officeooo:rsid="00060e71"/>
    </style:style>
    <style:style style:name="T3" style:family="text">
      <style:text-properties officeooo:rsid="0007a554"/>
    </style:style>
    <style:style style:name="T4" style:family="text">
      <style:text-properties fo:font-weight="normal" officeooo:rsid="000d3412" style:font-weight-asian="normal" style:font-weight-complex="normal"/>
    </style:style>
    <style:style style:name="T5" style:family="text">
      <style:text-properties fo:font-weight="normal" officeooo:rsid="000d7e80" style:font-weight-asian="normal" style:font-weight-complex="normal"/>
    </style:style>
    <style:style style:name="T6" style:family="text">
      <style:text-properties fo:font-weight="normal" officeooo:rsid="0009883a" style:font-weight-asian="normal" style:font-weight-complex="normal"/>
    </style:style>
    <style:style style:name="T7" style:family="text">
      <style:text-properties fo:font-weight="normal" officeooo:rsid="00131a19" style:font-weight-asian="normal" style:font-weight-complex="normal"/>
    </style:style>
    <style:style style:name="T8" style:family="text">
      <style:text-properties officeooo:rsid="000c80b4"/>
    </style:style>
    <style:style style:name="T9" style:family="text">
      <style:text-properties officeooo:rsid="000d3412"/>
    </style:style>
    <style:style style:name="T10" style:family="text">
      <style:text-properties officeooo:rsid="000e2bf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e2bf3" style:font-weight-asian="bold" style:font-weight-complex="bold"/>
    </style:style>
    <style:style style:name="T13" style:family="text">
      <style:text-properties officeooo:rsid="0011e775"/>
    </style:style>
    <style:style style:name="T14" style:family="text">
      <style:text-properties fo:color="#000000" officeooo:rsid="0018fe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Roboter Application</text:p>
      <text:p text:style-name="P2"/>
      <text:p text:style-name="P2"/>
      <text:p text:style-name="P2"/>
      <text:h text:style-name="Heading_20_1" text:outline-level="1">Problem Statement</text:h>
      <text:p text:style-name="P17">We want a simple differential robot simulator.</text:p>
      <text:p text:style-name="P3"/>
      <text:p text:style-name="P3"/>
      <text:h text:style-name="Heading_20_1" text:outline-level="1">Objectives</text:h>
      <text:p text:style-name="P13"><text:span text:style-name="T6">A small , clean, extensible simulator where robot moves, publish datas, receives commands and everything is observ</text:span><text:span text:style-name="T4">a</text:span><text:span text:style-name="T6">ble, loggable and replayable.</text:span></text:p>
      <text:p text:style-name="P5"/>
      <text:h text:style-name="Heading_20_1" text:outline-level="1">Requirements</text:h>
      <text:list xml:id="list299353866" text:style-name="L1">
        <text:list-item>
          <text:p text:style-name="P23">A user must be able to spawn one or more robot models on the scene using GUI interface.</text:p>
        </text:list-item>
        <text:list-item>
          <text:p text:style-name="P23">The user must be able to commands the robot direction, position, orientation, and simulation process( pause, reset, step,…)</text:p>
        </text:list-item>
        <text:list-item>
          <text:p text:style-name="P23">The user must be able to visualizes on the plotting window, the results of robot’s datas(speed, position, time).</text:p>
        </text:list-item>
        <text:list-item>
          <text:p text:style-name="P34"><text:span text:style-name="T4">The application must log all simulation dat</text:span><text:span text:style-name="T5">a</text:span><text:span text:style-name="T4">s in a record file and use these to review the simulation visually.</text:span></text:p>
        </text:list-item>
        <text:list-item>
          <text:p text:style-name="P34"><text:span text:style-name="T4">The application must implement different options for robotics simulation as path </text:span><text:span text:style-name="T7">trac</text:span><text:span text:style-name="T4">ing, path planning, obstacles avoidance, robots coordination.</text:span></text:p>
        </text:list-item>
        <text:list-item>
          <text:p text:style-name="P23">The user must be able to create a world and this world for simulation and mapping.</text:p>
        </text:list-item>
        <text:list-item>
          <text:p text:style-name="P34"><text:span text:style-name="T4">The application loop rate must be modifiable by the user and performs in a real time like behavi</text:span><text:span text:style-name="T5">o</text:span><text:span text:style-name="T4">ur.</text:span></text:p>
        </text:list-item>
        <text:list-item>
          <text:p text:style-name="P23">The loading for simulation must follow within 5 seconds maximum.</text:p>
        </text:list-item>
        <text:list-item>
          <text:p text:style-name="P23">The application must be cross-platform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Tools</text:h>
      <text:p text:style-name="P9"><text:span text:style-name="T12">L</text:span><text:span text:style-name="T11">anguage</text:span>: C++</text:p>
      <text:p text:style-name="P9"><text:span text:style-name="T11">Build system:</text:span> Cmake, Ninja/Make</text:p>
      <text:p text:style-name="P9"><text:span text:style-name="T11">Graphics:</text:span> S<text:span text:style-name="T10">fml</text:span></text:p>
      <text:p text:style-name="P9"><text:span text:style-name="T11">GUI</text:span>: T<text:span text:style-name="T10">gui</text:span></text:p>
      <text:p text:style-name="P9"><text:span text:style-name="T11">physcis library</text:span>: Box2D</text:p>
      <text:p text:style-name="P10"><text:span text:style-name="T11">ECS:</text:span> Flecs</text:p>
      <text:p text:style-name="P9"><text:span text:style-name="T11">Plotting library</text:span>: PlotGenCpp.</text:p>
      <text:p text:style-name="P9"><text:span text:style-name="T11">Version control:</text:span> Git/Github.</text:p>
      <text:p text:style-name="P9"/>
      <text:p text:style-name="P4"/>
      <text:h text:style-name="Heading_20_1" text:outline-level="1">Components</text:h>
      <text:h text:style-name="P16" text:outline-level="3">Message Bus</text:h>
      <text:p text:style-name="P5"><text:span text:style-name="T8">T</text:span>he communication system like a ROS topic, which:</text:p>
      <text:list xml:id="list2356074716" text:style-name="L2">
        <text:list-item>
          <text:p text:style-name="P21">Enables modularity.</text:p>
        </text:list-item>
        <text:list-item>
          <text:p text:style-name="P21">Allows logging, replays visualization.</text:p>
        </text:list-item>
        <text:list-item>
          <text:p text:style-name="P21">Make the system scalable.</text:p>
        </text:list-item>
      </text:list>
      <text:p text:style-name="P6"/>
      <text:h text:style-name="Heading_20_3" text:outline-level="3">Simulator loop</text:h>
      <text:p text:style-name="P5">Real time loop that thicks at a fixed frequency(10 Hz, 20 Hz, …).</text:p>
      <text:list xml:id="list2819588438" text:style-name="L3">
        <text:list-item>
          <text:p text:style-name="P22">Updates robot physi<text:span text:style-name="T9">c</text:span>s</text:p>
        </text:list-item>
        <text:list-item>
          <text:p text:style-name="P22">Publishes Odometry,</text:p>
        </text:list-item>
        <text:list-item>
          <text:p text:style-name="P22">Processes commands.</text:p>
        </text:list-item>
        <text:list-item>
          <text:p text:style-name="P22">Drive<text:span text:style-name="T9">s </text:span><text:s/>the whole syste<text:span text:style-name="T8">m.</text:span></text:p>
        </text:list-item>
      </text:list>
      <text:h text:style-name="Heading_20_3" text:outline-level="3" text:is-list-header="true"/>
      <text:h text:style-name="Heading_20_3" text:outline-level="3">Differential Models(Differential drive)</text:h>
      <text:p text:style-name="P5">Simple physic models</text:p>
      <text:list xml:id="list451429466" text:style-name="L4">
        <text:list-item>
          <text:p text:style-name="P24">left / right wheels velocities.</text:p>
        </text:list-item>
        <text:list-item>
          <text:p text:style-name="P24">position <text:s/>updates</text:p>
        </text:list-item>
        <text:list-item>
          <text:p text:style-name="P25">orientation <text:s/>updates</text:p>
        </text:list-item>
      </text:list>
      <text:p text:style-name="P7"/>
      <text:h text:style-name="Heading_20_3" text:outline-level="3">Recorder (Single writer logging thread)</text:h>
      <text:p text:style-name="P7">Robust login system</text:p>
      <text:list xml:id="list703870301" text:style-name="L5">
        <text:list-item>
          <text:p text:style-name="P26"><text:soft-page-break/>logs every message.</text:p>
        </text:list-item>
        <text:list-item>
          <text:p text:style-name="P26">No corruption of data.</text:p>
        </text:list-item>
        <text:list-item>
          <text:p text:style-name="P26">replayable</text:p>
        </text:list-item>
        <text:list-item>
          <text:p text:style-name="P26">timestamped</text:p>
        </text:list-item>
      </text:list>
      <text:p text:style-name="P7"/>
      <text:h text:style-name="Heading_20_3" text:outline-level="3">History System</text:h>
      <text:p text:style-name="P7">stores messages inmemory for</text:p>
      <text:list xml:id="list2588109201" text:style-name="L6">
        <text:list-item>
          <text:p text:style-name="P27">debugging</text:p>
        </text:list-item>
        <text:list-item>
          <text:p text:style-name="P27">visualization</text:p>
        </text:list-item>
        <text:list-item>
          <text:p text:style-name="P27">replay</text:p>
        </text:list-item>
      </text:list>
      <text:p text:style-name="P7"/>
      <text:p text:style-name="P12"/>
      <text:h text:style-name="Heading_20_1" text:outline-level="1">Roadmap </text:h>
      <text:h text:style-name="Heading_20_3" text:outline-level="3">Phase 1: Core engine</text:h>
      <text:list xml:id="list370499657" text:style-name="L7">
        <text:list-item>
          <text:p text:style-name="P28">message bus</text:p>
        </text:list-item>
        <text:list-item>
          <text:p text:style-name="P28">simulator loop</text:p>
        </text:list-item>
        <text:list-item>
          <text:p text:style-name="P28">robot model</text:p>
        </text:list-item>
        <text:list-item>
          <text:p text:style-name="P28">logging</text:p>
        </text:list-item>
        <text:list-item>
          <text:p text:style-name="P28">history</text:p>
        </text:list-item>
      </text:list>
      <text:p text:style-name="P7"/>
      <text:h text:style-name="Heading_20_3" text:outline-level="3">Phase 2: Tools</text:h>
      <text:list xml:id="list2540040529" text:style-name="L8">
        <text:list-item>
          <text:p text:style-name="P29">replay system</text:p>
        </text:list-item>
        <text:list-item>
          <text:p text:style-name="P29">gui log viewer</text:p>
        </text:list-item>
        <text:list-item>
          <text:p text:style-name="P29">real time plots</text:p>
        </text:list-item>
        <text:list-item>
          <text:p text:style-name="P29">simulation controls(pause, step, reset)</text:p>
        </text:list-item>
      </text:list>
      <text:p text:style-name="P7"/>
      <text:h text:style-name="Heading_20_3" text:outline-level="3">Phase <text:span text:style-name="T13">3:</text:span> Visualization</text:h>
      <text:list xml:id="list3711082304" text:style-name="L9">
        <text:list-item>
          <text:p text:style-name="P30">2D robots view</text:p>
        </text:list-item>
        <text:list-item>
          <text:p text:style-name="P30">path tracing</text:p>
        </text:list-item>
        <text:list-item>
          <text:p text:style-name="P35"><text:span text:style-name="T4">sensor visualization(laser scan, …</text:span><text:span text:style-name="T5">)</text:span></text:p>
        </text:list-item>
        <text:list-item>
          <text:p text:style-name="P31"/>
        </text:list-item>
      </text:list>
      <text:h text:style-name="Heading_20_3" text:outline-level="3">Phase 4: <text:s/>Robotics features</text:h>
      <text:list xml:id="list2981438566" text:style-name="L10">
        <text:list-item>
          <text:p text:style-name="P32">controllers</text:p>
        </text:list-item>
        <text:list-item>
          <text:p text:style-name="P32">path planning</text:p>
        </text:list-item>
        <text:list-item>
          <text:p text:style-name="P32"><text:soft-page-break/>obstacle avoidance</text:p>
        </text:list-item>
        <text:list-item>
          <text:p text:style-name="P32">mapping</text:p>
        </text:list-item>
        <text:list-item>
          <text:p text:style-name="P32">multi robots coordination</text:p>
        </text:list-item>
      </text:list>
      <text:p text:style-name="P8"/>
      <text:h text:style-name="Heading_20_3" text:outline-level="3">Phase 5: Advanced</text:h>
      <text:list xml:id="list3992029049" text:style-name="L11">
        <text:list-item>
          <text:p text:style-name="P33">scripting (python, lua)</text:p>
        </text:list-item>
        <text:list-item>
          <text:p text:style-name="P33">networked simulation</text:p>
        </text:list-item>
        <text:list-item>
          <text:p text:style-name="P33">plugin system</text:p>
        </text:list-item>
        <text:list-item>
          <text:p text:style-name="P33">integration with ROS.</text:p>
        </text:list-item>
      </text:list>
      <text:p text:style-name="P11"/>
      <text:h text:style-name="Heading_20_1" text:outline-level="1">Use Case diagram</text:h>
      <text:p text:style-name="P1"><draw:frame draw:style-name="fr1" draw:name="Image1" text:anchor-type="char" svg:x="0.0835in" svg:y="0.1398in" svg:width="6.6929in" svg:height="6.2165in" draw:z-index="0"><draw:image xlink:href="Pictures/10000000000002CD0000029A51F661444BFAEC5A.jpg" xlink:type="simple" xlink:show="embed" xlink:actuate="onLoad" loext:mime-type="image/jpeg"/></draw:frame></text:p>
      <text:p text:style-name="P18">Image: use case diagram of the application</text:p>
      <text:h text:style-name="Heading_20_1" text:outline-level="1"><text:soft-page-break/>Use Case description</text:h>
      <text:h text:style-name="Heading_20_3" text:outline-level="3">Spawn robot models</text:h>
      <text:list xml:id="list3724089524" text:style-name="L12">
        <text:list-header>
          <text:p text:style-name="P19"/>
        </text:list-header>
        <text:list-item>
          <text:p text:style-name="P36"><text:span text:style-name="T1">Goal <text:s/></text:span>add <text:span text:style-name="T2">one or many</text:span> <text:span text:style-name="T2">r</text:span>obot<text:span text:style-name="T2">(s)</text:span> model on the graphic scene.</text:p>
        </text:list-item>
        <text:list-item>
          <text:p text:style-name="P36"><text:span text:style-name="T1">Summary of the use case </text:span>The user choose a robot models on the catalog and <text:s/>enters some default parameters like <text:span text:style-name="T3">name, </text:span>position, <text:span text:style-name="T3">orientation, </text:span>step rate, <text:span text:style-name="T2">then choose a given world to load in the robot model</text:span>.</text:p>
        </text:list-item>
      </text:list>
      <text:list xml:id="list3546345592" text:style-name="L13">
        <text:list-item>
          <text:p text:style-name="P38"><text:span text:style-name="T1">Actors </text:span><text:s/>The application user</text:p>
        </text:list-item>
        <text:list-item>
          <text:p text:style-name="P39"><text:span text:style-name="T1">Preconditions</text:span> <text:s/>Robots models are already loaded into the catalog,</text:p>
        </text:list-item>
        <text:list-item>
          <text:p text:style-name="P39"><text:span text:style-name="T1">Trigger </text:span>The user use presses the “Add” button.</text:p>
        </text:list-item>
        <text:list-item>
          <text:p text:style-name="P40">Primary action sequence </text:p>
        </text:list-item>
      </text:list>
      <text:p text:style-name="P14"><text:tab/>- The application <text:s/>operates the robot parameter , the step rate and the world.</text:p>
      <text:p text:style-name="P14"><text:tab/>- The robot model is loaded with the given parameters on the graphic scene.</text:p>
      <text:list xml:id="list2088077585" text:style-name="L14">
        <text:list-item>
          <text:p text:style-name="P42"><text:span text:style-name="T1">Alternate action sequence </text:span>The parameters are incorrect or out of scope</text:p>
          <text:p text:style-name="P42">- Highlight the incorrect form field</text:p>
          <text:p text:style-name="P42">- Display explanatory message</text:p>
          <text:p text:style-name="P42">- The user corrects the erroneous form field.</text:p>
          <text:p text:style-name="P42">- Return to primary sequence</text:p>
        </text:list-item>
        <text:list-item>
          <text:p text:style-name="P42"><text:span text:style-name="T1">Post-condition <text:s/></text:span>The user sees the spawned model </text:p>
        </text:list-item>
        <text:list-item>
          <text:p text:style-name="P41">Nonfunctional requirements </text:p>
          <text:p text:style-name="P42">- The robot must be spawned within 2 seconds.</text:p>
          <text:p text:style-name="P42">- The application must be usable by a any user.</text:p>
        </text:list-item>
      </text:list>
      <text:p text:style-name="P15"/>
      <text:p text:style-name="P15"/>
      <text:h text:style-name="Heading_20_3" text:outline-level="3">Proceed robot simulation</text:h>
      <text:list xml:id="list152304325775620" text:continue-list="list3724089524" text:style-name="L12">
        <text:list-item>
          <text:p text:style-name="P37"><text:span text:style-name="T1">Goal <text:s/></text:span><text:span text:style-name="T14">performs robots simulation 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5-31T23:35:47.409227040</meta:creation-date>
    <dc:date>2026-06-25T15:23:01.820344875</dc:date>
    <meta:editing-duration>PT35M58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5" meta:paragraph-count="104" meta:word-count="619" meta:character-count="3590" meta:non-whitespace-character-count="3121"/>
  </office:meta>
</office:document-meta>
</file>